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67ac" officeooo:paragraph-rsid="001067ac"/>
    </style:style>
    <style:style style:name="P2" style:family="paragraph" style:parent-style-name="Standard">
      <style:text-properties officeooo:rsid="001553f9" officeooo:paragraph-rsid="001553f9"/>
    </style:style>
    <style:style style:name="P3" style:family="paragraph" style:parent-style-name="Standard">
      <style:text-properties officeooo:rsid="001067ac" officeooo:paragraph-rsid="001553f9"/>
    </style:style>
    <style:style style:name="P4" style:family="paragraph" style:parent-style-name="Standard">
      <style:text-properties officeooo:rsid="001586a6" officeooo:paragraph-rsid="001586a6"/>
    </style:style>
    <style:style style:name="T1" style:family="text">
      <style:text-properties officeooo:rsid="001586a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ugs encontrados:</text:p>
      <text:p text:style-name="P1">-<text:span text:style-name="T1">Retroarch se esta crasheando</text:span></text:p>
      <text:p text:style-name="P2">-El mapeo de controles <text:span text:style-name="T1">tengo que apretar 2 veces y me abre un menu que solo dice “perfil de controles”, yo quiero que abra una ventana donde se pueda n cambiar los inputs</text:span></text:p>
      <text:p text:style-name="P2">-Los ajustes no se guardan</text:p>
      <text:p text:style-name="P2">-<text:span text:style-name="T1">Si pongo el modo streaming deberian estar tanto el juego y el retrocloud en el mismo escritorio</text:span></text:p>
      <text:p text:style-name="P2">-<text:span text:style-name="T1">Select + start no me cierra el emulador</text:span></text:p>
      <text:p text:style-name="P2"/>
      <text:p text:style-name="P3">Implementaciones:</text:p>
      <text:p text:style-name="P4">-En la parte de configuraciones que solo hayan configuraciones globales de retrocloud, despues vamos a hacer una parte de configuraciones para cada emulador, por ejemplo el shader crt que es solo de retroarch no deberia estar, revisar las demas configuraciones (a excepcion del mapeo de controles que eso quiero que este unificado para todos los emulador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iberation Sans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iberation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iberation Sans" style:font-family-complex="'Liberation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iberation Sans" style:font-family-complex="'Liberation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 style:font-family-complex="'Liberation Sans'" style:font-family-generic-complex="swiss"/>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8T22:30:53.773370162</meta:creation-date>
    <dc:date>2026-05-29T23:57:07.397134620</dc:date>
    <meta:editing-duration>PT2H37M20S</meta:editing-duration>
    <meta:editing-cycles>3</meta:editing-cycles>
    <meta:generator>LibreOffice/26.2.3.2$Linux_X86_64 LibreOffice_project/7d74455cffae7a589951233f185ae0303c082020</meta:generator>
    <meta:document-statistic meta:table-count="0" meta:image-count="0" meta:object-count="0" meta:page-count="1" meta:paragraph-count="8" meta:word-count="126" meta:character-count="752" meta:non-whitespace-character-count="634"/>
  </office:meta>
</office:document-meta>
</file>